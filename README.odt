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T21" style:parent-style-name="Policepardéfaut" style:family="text">
      <style:text-properties fo:language="en" fo:country="GB"/>
    </style:style>
  </office:automatic-styles>
  <office:body>
    <office:text text:use-soft-page-breaks="true">
      <text:p text:style-name="P1"># Student Information Management System</text:p>
      <text:p text:style-name="P2"/>
      <text:p text:style-name="P3">## Project Overview</text:p>
      <text:p text:style-name="P4">This database application is designed to manage and automate academic and financial records for an educational institution. Developed using SQL and PL/SQL, the application handles core student management operations, tracks course modules, automates tuition fee calculations based on registered credits, and processes student academic performance metrics.</text:p>
      <text:p text:style-name="P5"/>
      <text:p text:style-name="P6">## Core Features Implemented</text:p>
      <text:p text:style-name="P7"/>
      <text:p text:style-name="P8">* **Relational Schema**</text:p>
      <text:p text:style-name="P9">The database consists of three interconnected tables (Students, Courses, and Enrollments) that enforce data integrity through primary keys, foreign keys, and structural constraints.</text:p>
      <text:p text:style-name="P10"/>
      <text:p text:style-name="P11">* **Database Function (CalculateTuition)**</text:p>
      <text:p text:style-name="P12">A modular PL/SQL function that takes a student's ID as an input, dynamically matches their course enrollments with the credit structures, and returns the total calculated tuition fee.</text:p>
      <text:p text:style-name="P13"/>
      <text:p text:style-name="P14">* **Stored Procedure (UpdateStudentTuition)**</text:p>
      <text:p text:style-name="P15">A reusable database procedure that automates administrative tasks by calling the calculation function and directly updating the student's financial records in the system.</text:p>
      <text:p text:style-name="P16"/>
      <text:p text:style-name="P17">* **Window Functions**</text:p>
      <text:p text:style-name="P18">The application utilizes advanced SQL analytical window functions (DENSE_RANK and AVG OVER) to calculate real-time performance rankings and course averages without collapsing individual student records or disrupting the primary data views.</text:p>
      <text:p text:style-name="P19"/>
      <text:p text:style-name="P20">* **Anonymous PL/SQL Block**</text:p>
      <text:soft-page-break/>
      <text:p text:style-name="Normal"><text:span text:style-name="T21">A complete execution block that acts as the driver program. It implements a database cursor loop to automatically process financial updates for every student profile and prints an advanced performance and analytics report using console outpu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akar Ibrahim</meta:initial-creator>
    <dc:creator>Abakar Ibrahim</dc:creator>
    <meta:creation-date>2026-07-03T12:49:00Z</meta:creation-date>
    <dc:date>2026-07-03T13:04:00Z</dc:date>
    <meta:template xlink:href="Normal" xlink:type="simple"/>
    <meta:editing-cycles>4</meta:editing-cycles>
    <meta:editing-duration>PT360S</meta:editing-duration>
    <meta:document-statistic meta:page-count="2" meta:paragraph-count="3" meta:word-count="251" meta:character-count="1634" meta:row-count="11" meta:non-whitespace-character-count="1386"/>
  </office:meta>
</office:document-meta>
</file>