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23307-2023</text:p>
      <text:p text:style-name="Normal">31679-2025</text:p>
      <text:p text:style-name="Normal">32206-2025</text:p>
      <text:p text:style-name="Normal">31517-2025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akar Ibrahim</meta:initial-creator>
    <dc:creator>Abakar Ibrahim</dc:creator>
    <meta:creation-date>2026-07-03T14:03:00Z</meta:creation-date>
    <dc:date>2026-07-03T14:07:00Z</dc:date>
    <meta:template xlink:href="Normal" xlink:type="simple"/>
    <meta:editing-cycles>2</meta:editing-cycles>
    <meta:editing-duration>PT240S</meta:editing-duration>
    <meta:document-statistic meta:page-count="1" meta:paragraph-count="1" meta:word-count="6" meta:character-count="43" meta:row-count="1" meta:non-whitespace-character-count="38"/>
  </office:meta>
</office:document-meta>
</file>