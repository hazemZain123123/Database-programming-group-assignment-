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2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3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3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T96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CREATE TABLE Students (</text:p>
      <text:p text:style-name="P2"><text:s text:c="4"/>student_id NUMBER GENERATED BY DEFAULT AS IDENTITY PRIMARY KEY,</text:p>
      <text:p text:style-name="P3"><text:s text:c="4"/>student_name VARCHAR2(100) NOT NULL,</text:p>
      <text:p text:style-name="P4"><text:s text:c="4"/>email VARCHAR2(100),</text:p>
      <text:p text:style-name="P5"><text:s text:c="4"/>tuition_due NUMBER(10,2) DEFAULT 0.00</text:p>
      <text:p text:style-name="P6">);</text:p>
      <text:p text:style-name="P7"/>
      <text:p text:style-name="P8">CREATE TABLE Courses (</text:p>
      <text:p text:style-name="P9"><text:s text:c="4"/>course_id NUMBER GENERATED BY DEFAULT AS IDENTITY PRIMARY KEY,</text:p>
      <text:p text:style-name="P10"><text:s text:c="4"/>course_name VARCHAR2(100) NOT NULL,</text:p>
      <text:p text:style-name="P11"><text:s text:c="4"/>credits NUMBER NOT NULL,</text:p>
      <text:p text:style-name="P12"><text:s text:c="4"/>fee_per_credit NUMBER(8,2) NOT NULL</text:p>
      <text:p text:style-name="P13">);</text:p>
      <text:p text:style-name="P14"/>
      <text:p text:style-name="P15">CREATE TABLE Enrollments (</text:p>
      <text:p text:style-name="P16"><text:s text:c="4"/>enrollment_id NUMBER GENERATED BY DEFAULT AS IDENTITY PRIMARY KEY,</text:p>
      <text:p text:style-name="P17"><text:s text:c="4"/>student_id NUMBER REFERENCES Students(student_id),</text:p>
      <text:p text:style-name="P18"><text:s text:c="4"/>course_id NUMBER REFERENCES Courses(course_id),</text:p>
      <text:p text:style-name="P19"><text:s text:c="4"/>grade_mark NUMBER(5,2),</text:p>
      <text:p text:style-name="P20"><text:s text:c="4"/>enrollment_date DATE DEFAULT SYSDATE</text:p>
      <text:p text:style-name="P21">);</text:p>
      <text:p text:style-name="P22"/>
      <text:p text:style-name="P23"/>
      <text:p text:style-name="P24"/>
      <text:p text:style-name="P25"/>
      <text:p text:style-name="P26">INSERT INTO Students (student_name, email) VALUES ('Abakar Ibrahim', 'abakar@unilak.ac.rw');</text:p>
      <text:p text:style-name="P27">INSERT INTO Students (student_name, email) VALUES ('Keza Divine', 'keza@unilak.ac.rw');</text:p>
      <text:p text:style-name="P28"/>
      <text:p text:style-name="P29">INSERT INTO Courses (course_name, credits, fee_per_credit) VALUES ('Database Programming', '4', 15000);</text:p>
      <text:p text:style-name="P30">INSERT INTO Courses (course_name, credits, fee_per_credit) VALUES ('Software Engineering', '3', 15000);</text:p>
      <text:p text:style-name="P31"/>
      <text:p text:style-name="P32">INSERT INTO Enrollments (student_id, course_id, grade_mark) VALUES (1, 1, 85);</text:p>
      <text:p text:style-name="P33">INSERT INTO Enrollments (student_id, course_id, grade_mark) VALUES (2, 1, 92);</text:p>
      <text:p text:style-name="P34">INSERT INTO Enrollments (student_id, course_id, grade_mark) VALUES (1, 2, 78);</text:p>
      <text:p text:style-name="P35">COMMIT;</text:p>
      <text:p text:style-name="P36"/>
      <text:p text:style-name="P37"/>
      <text:p text:style-name="P38"/>
      <text:p text:style-name="P39"/>
      <text:p text:style-name="P40"/>
      <text:p text:style-name="P41">CREATE OR REPLACE FUNCTION CalculateTuition(p_student_id IN NUMBER)<text:s/></text:p>
      <text:p text:style-name="P42">RETURN NUMBER IS</text:p>
      <text:p text:style-name="P43"><text:s text:c="4"/>v_total_fee NUMBER(10,2) := 0;</text:p>
      <text:p text:style-name="P44">BEGIN</text:p>
      <text:p text:style-name="P45"><text:s text:c="4"/>SELECT NVL(SUM(c.credits * c.fee_per_credit), 0)</text:p>
      <text:p text:style-name="P46"><text:s text:c="4"/>INTO v_total_fee</text:p>
      <text:p text:style-name="P47"><text:s text:c="4"/>FROM Enrollments e</text:p>
      <text:p text:style-name="P48"><text:s text:c="4"/>JOIN Courses c ON e.course_id = c.course_id</text:p>
      <text:p text:style-name="P49"><text:s text:c="4"/>WHERE e.student_id = p_student_id;</text:p>
      <text:p text:style-name="P50"><text:s text:c="4"/></text:p>
      <text:p text:style-name="P51"><text:s text:c="4"/>RETURN v_total_fee;</text:p>
      <text:p text:style-name="P52">END;</text:p>
      <text:p text:style-name="P53">/</text:p>
      <text:p text:style-name="P54"/>
      <text:p text:style-name="P55"/>
      <text:p text:style-name="P56">CREATE OR REPLACE PROCEDURE UpdateStudentTuition(p_student_id IN NUMBER) IS</text:p>
      <text:p text:style-name="P57"><text:s text:c="4"/>v_calculated_balance NUMBER(10,2);</text:p>
      <text:p text:style-name="P58">BEGIN</text:p>
      <text:p text:style-name="P59"><text:s text:c="4"/>v_calculated_balance := CalculateTuition(p_student_id);</text:p>
      <text:p text:style-name="P60"><text:s text:c="4"/></text:p>
      <text:p text:style-name="P61"><text:s text:c="4"/>UPDATE Students</text:p>
      <text:p text:style-name="P62"><text:s text:c="4"/>SET tuition_due = v_calculated_balance</text:p>
      <text:p text:style-name="P63"><text:s text:c="4"/>WHERE student_id = p_student_id;</text:p>
      <text:p text:style-name="P64"><text:s text:c="4"/></text:p>
      <text:p text:style-name="P65"><text:s text:c="4"/>COMMIT;</text:p>
      <text:p text:style-name="P66">END;</text:p>
      <text:p text:style-name="P67">/</text:p>
      <text:p text:style-name="P68"/>
      <text:p text:style-name="P69"/>
      <text:p text:style-name="P70">SELECT<text:s/></text:p>
      <text:p text:style-name="P71"><text:s text:c="4"/>student_id,<text:s/></text:p>
      <text:p text:style-name="P72"><text:s text:c="4"/>course_id,<text:s/></text:p>
      <text:p text:style-name="P73"><text:s text:c="4"/>grade_mark,</text:p>
      <text:p text:style-name="P74"><text:s text:c="4"/>DENSE_RANK() OVER (PARTITION BY course_id ORDER BY grade_mark DESC) AS performance_rank</text:p>
      <text:p text:style-name="P75">FROM Enrollments;</text:p>
      <text:p text:style-name="P76"/>
      <text:p text:style-name="P77">SET SERVEROUTPUT ON;</text:p>
      <text:p text:style-name="P78"/>
      <text:p text:style-name="P79">DECLARE</text:p>
      <text:p text:style-name="P80"><text:s text:c="4"/>CURSOR c_students IS SELECT student_id FROM Students;</text:p>
      <text:soft-page-break/>
      <text:p text:style-name="P81">BEGIN</text:p>
      <text:p text:style-name="P82"><text:s text:c="4"/>FOR r_student IN c_students LOOP</text:p>
      <text:p text:style-name="P83"><text:s text:c="8"/>UpdateStudentTuition(r_student.student_id);</text:p>
      <text:p text:style-name="P84"><text:s text:c="4"/>END LOOP;</text:p>
      <text:p text:style-name="P85"><text:s text:c="4"/></text:p>
      <text:p text:style-name="P86"><text:s text:c="4"/>DBMS_OUTPUT.PUT_LINE('--- STUDENT PERFORMANCE &amp; FINANCIAL REPORT ---');</text:p>
      <text:p text:style-name="P87"><text:s text:c="4"/>FOR r_report IN (</text:p>
      <text:p text:style-name="P88"><text:s text:c="8"/>SELECT student_id, course_id, grade_mark,</text:p>
      <text:p text:style-name="P89"><text:s text:c="15"/>AVG(grade_mark) OVER(PARTITION BY course_id) AS course_average_mark</text:p>
      <text:p text:style-name="P90"><text:s text:c="8"/>FROM Enrollments</text:p>
      <text:p text:style-name="P91"><text:s text:c="4"/>) LOOP</text:p>
      <text:p text:style-name="P92"><text:s text:c="8"/>DBMS_OUTPUT.PUT_LINE('Student ID: ' || r_report.student_id ||<text:s/></text:p>
      <text:p text:style-name="P93"><text:s text:c="29"/>' | Course ID: ' || r_report.course_id ||<text:s/></text:p>
      <text:p text:style-name="P94"><text:s text:c="29"/>' | Mark: ' || r_report.grade_mark ||</text:p>
      <text:p text:style-name="P95"><text:s text:c="29"/>' | Course Average: ' || ROUND(r_report.course_average_mark, 2));</text:p>
      <text:p text:style-name="Normal"><text:span text:style-name="T96"><text:s text:c="4"/></text:span>END LOOP;</text:p>
      <text:p text:style-name="Normal">END;</text:p>
      <text:p text:style-name="Normal">/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akar Ibrahim</meta:initial-creator>
    <dc:creator>Abakar Ibrahim</dc:creator>
    <meta:creation-date>2026-07-03T12:35:00Z</meta:creation-date>
    <dc:date>2026-07-03T13:04:00Z</dc:date>
    <meta:template xlink:href="Normal" xlink:type="simple"/>
    <meta:editing-cycles>3</meta:editing-cycles>
    <meta:editing-duration>PT960S</meta:editing-duration>
    <meta:document-statistic meta:page-count="4" meta:paragraph-count="5" meta:word-count="454" meta:character-count="2949" meta:row-count="20" meta:non-whitespace-character-count="2500"/>
  </office:meta>
</office:document-meta>
</file>